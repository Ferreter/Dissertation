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 style:parent-style-name="Graphics">
      <style:graphic-properties draw:fill="none" fo:clip="rect(0in, 0in, 0.75529in, 0.7485in)" draw:stroke="none"/>
    </style:style>
    <style:style style:family="graphic" style:name="a409" style:parent-style-name="Graphics">
      <style:graphic-properties draw:fill="none" fo:clip="rect(0in, 4.07995in, -0.00012in, 2.03907in)" draw:stroke="non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in" svg:height="7.5in" draw:id="id63" draw:style-name="a383" draw:name="Rectangle 1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6" draw:name="TextBox 4" svg:x="0.7in" svg:y="0.35583in" svg:width="4.77756in" svg:height="2.14003in">
          <draw:text-box>
            <text:p text:style-name="a385" text:class-names="" text:cond-style-name=""><text:span text:style-name="a384" text:class-names="">Predicting End-of-Day Market Moves for Options Trading</text:span></text:p>
          </draw:text-box>
          <svg:title/>
          <svg:desc/>
        </draw:frame>
        <draw:custom-shape svg:x="0.7in" svg:y="2.82917in" svg:width="3.8in" svg:height="0.02in" draw:id="id65" draw:style-name="a389" draw:name="sketchy line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14184in" svg:width="4.64085in" svg:height="3.63153in" draw:id="id66" draw:style-name="a408" draw:name="Rectangle 2">
          <svg:title/>
          <svg:desc/>
          <text:list text:style-name="a392">
            <text:list-item>
              <text:p text:style-name="a391" text:class-names="" text:cond-style-name=""><text:span text:style-name="a390" text:class-names=""/></text:p>
            </text:list-item>
          </text:list>
          <text:list text:style-name="a395">
            <text:list-item>
              <text:p text:style-name="a394" text:class-names="" text:cond-style-name=""><text:span text:style-name="a393" text:class-names="">In the last hour of trading (3pm–4pm), markets often move quickly<text:s text:c="1"/></text:span></text:p>
            </text:list-item>
          </text:list>
          <text:list text:style-name="a398">
            <text:list-item>
              <text:p text:style-name="a397" text:class-names="" text:cond-style-name=""><text:span text:style-name="a396" text:class-names=""/></text:p>
            </text:list-item>
          </text:list>
          <text:list text:style-name="a401">
            <text:list-item>
              <text:p text:style-name="a400" text:class-names="" text:cond-style-name=""><text:span text:style-name="a399" text:class-names="">These moves can create short-term trading opportunities<text:s text:c="1"/></text:span></text:p>
            </text:list-item>
          </text:list>
          <text:list text:style-name="a404">
            <text:list-item>
              <text:p text:style-name="a403" text:class-names="" text:cond-style-name=""><text:span text:style-name="a402" text:class-names=""/></text:p>
            </text:list-item>
          </text:list>
          <text:list text:style-name="a407">
            <text:list-item>
              <text:p text:style-name="a406" text:class-names="" text:cond-style-name=""><text:span text:style-name="a405" text:class-names="">The goal is to predict whether the market will go up, down, or stay stable<text:s text:c="1"/>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09" draw:name="Picture 8" svg:x="5.80895in" svg:y="0.00001in" svg:width="7.52272in" svg:height="7.4999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10" draw:master-page-name="Master1-Layout9-picTx-Picture-with-Caption" presentation:presentation-page-layout-name="Master1-PPL9" draw:id="Slide-259">
        <draw:frame draw:id="id68" presentation:style-name="a414" draw:name="Title 1" svg:x="0.9184in" svg:y="0.5in" svg:width="4.30035in" svg:height="1.75in" presentation:class="title" presentation:placeholder="false">
          <draw:text-box>
            <text:p text:style-name="a413" text:class-names="" text:cond-style-name=""><text:span text:style-name="a411" text:class-names="">Key Concepts<text:line-break/></text:span><text:span text:style-name="a412" text:class-names=""/></text:p>
          </draw:text-box>
          <svg:title/>
          <svg:desc/>
        </draw:frame>
        <draw:frame draw:id="id69" presentation:style-name="a444" draw:name="Text Placeholder 3" svg:x="0.74636in" svg:y="2.44355in" svg:width="4.30035in" svg:height="4.1684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5" text:class-names=""><text:s text:c="1"/>Intraday Data : Data collected<text:s text:c="1"/></text:span><text:span text:style-name="a416" text:class-names="">during the day</text:span><text:span text:style-name="a417" text:class-names=""><text:s text:c="1"/>(every few minutes)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Volatility: How much the market is moving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VIX (Volatility Index) :Often called the “fear index”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Momentum: Whether the market is trending up or dow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Options Data: Information from the options market (bets on future price moves)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<text:s text:c="1"/>Gamma Exposure (Gamma Pool) : Measures how options traders might affect the market itself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  <draw:frame draw:id="id70" draw:style-name="a445" draw:name="Picture 6" svg:x="5.4123in" svg:y="0.77957in" svg:width="7.47225in" svg:height="4.47849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arsh Khatri</meta:initial-creator>
    <dc:creator>Harsh Khatri</dc:creator>
    <meta:creation-date>2026-03-25T12:34:02Z</meta:creation-date>
    <dc:date>2026-03-25T14:30:22Z</dc:date>
    <meta:editing-cycles>1</meta:editing-cycles>
    <meta:editing-duration>PT6979S</meta:editing-duration>
    <meta:document-statistic meta:paragraph-count="15" meta:word-count="126"/>
  </office:meta>
</office:document-meta>
</file>